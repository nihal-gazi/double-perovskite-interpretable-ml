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d97" officeooo:paragraph-rsid="000ecd97"/>
    </style:style>
    <style:style style:name="P2" style:family="paragraph" style:parent-style-name="Standard">
      <style:text-properties officeooo:rsid="000efbaa" officeooo:paragraph-rsid="000efb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ovskite dataset</text:p>
      <text:p text:style-name="P1"/>
      <text:p text:style-name="P1">data is split into 'true' and 'non-true' perovskites</text:p>
      <text:p text:style-name="P1"/>
      <text:p text:style-name="P1">should my target variable be a</text:p>
      <text:p text:style-name="P1">binary classification predicting</text:p>
      <text:p text:style-name="P1">whether a compound</text:p>
      <text:p text:style-name="P1">forms a true perovskite?</text:p>
      <text:p text:style-name="P1"/>
      <text:p text:style-name="P1"/>
      <text:p text:style-name="P1">Or are we predicting a specific property like Band Gap, Formation Energy, or Magnetic State?</text:p>
      <text:p text:style-name="P1"/>
      <text:p text:style-name="P1">To predict:</text:p>
      <text:p text:style-name="P1">properties</text:p>
      <text:p text:style-name="P1"/>
      <text:p text:style-name="P1">trend</text:p>
      <text:p text:style-name="P1"/>
      <text:p text:style-name="P1">magnetic prperty – doping</text:p>
      <text:p text:style-name="P1"/>
      <text:p text:style-name="P1"/>
      <text:p text:style-name="P1">input: electron valence, ... , dependency</text:p>
      <text:p text:style-name="P1"/>
      <text:p text:style-name="P1"/>
      <text:p text:style-name="P1"/>
      <text:p text:style-name="P1"/>
      <text:p text:style-name="P1"/>
      <text:p text:style-name="P1">-----------</text:p>
      <text:p text:style-name="P1"/>
      <text:p text:style-name="P2">Prof: you can put as input – actually the dependent variables that ‘you’ think – like – valence electrons and stuffs – for example the perovskite system that you have been provided – you can take for each atom’s valence electron and then you can find the properties on how various other properties change.</text:p>
      <text:p text:style-name="P2"/>
      <text:p text:style-name="P2">Me: so I’ll have to bring all of these properties into a single model</text:p>
      <text:p text:style-name="P2">Prof: Like yes – different models might also be good at predicting different properties</text:p>
      <text:p text:style-name="P2">Me: Ahh got it got it</text:p>
      <text:p text:style-name="P2">Prof: That is what you’ll have to see – as to which model can get it done well – which can reduce the loss very well<text:line-break/>Me: Ooooh</text:p>
      <text:p text:style-name="P2">Prof: Thats what basically you have to see<text:line-break/>Me: And sir, I saw a true and non-true perovskite table separately</text:p>
      <text:p text:style-name="P2">Prof: Separately they can be done.</text:p>
      <text:p text:style-name="P2">Me: Ah got it got it.</text:p>
      <text:p text:style-name="P2">Prof: Do you think the data is sufficient?<text:line-break/>Me: Yes sir. There appears to be sufficient data.</text:p>
      <text:p text:style-name="P2">Prof: Hmm</text:p>
      <text:p text:style-name="P2">Me: Now sir, there is a column named “Keep” – like as to they are “TRUE” or “FALSE” – thats what i could not understand</text:p>
      <text:p text:style-name="P2">Prof: True perovskite and non-true?</text:p>
      <text:p text:style-name="P2">Me: Yaa, there is a column named “KEEP”</text:p>
      <text:p text:style-name="P2">Prof: Uhh...True perovskite is what we have to normally work with. Rest are normal oxides. Perovskite has a different structure, hence it is of interest to us. And also do note that – all oxides <text:soft-page-break/>are not perovskites – ok? Lets first do with perovskite – then we will see whats there in non-perovskite..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20:18:42.634168800</meta:creation-date>
    <meta:editing-duration>PT3H13M56S</meta:editing-duration>
    <meta:editing-cycles>2</meta:editing-cycles>
    <meta:generator>LibreOffice/26.2.0.3$Windows_X86_64 LibreOffice_project/620$Build-3</meta:generator>
    <dc:date>2026-05-20T23:42:20.364249500</dc:date>
    <meta:document-statistic meta:table-count="0" meta:image-count="0" meta:object-count="0" meta:page-count="2" meta:paragraph-count="27" meta:word-count="301" meta:character-count="1737" meta:non-whitespace-character-count="1449"/>
  </office:meta>
</office:document-meta>
</file>