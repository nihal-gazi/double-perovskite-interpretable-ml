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T1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ghlights</text:p>
      <text:list text:style-name="L1">
        <text:list-item>
          <text:p text:style-name="P2">Machine learning discovers physical laws for double perovskite materials.</text:p>
        </text:list-item>
        <text:list-item>
          <text:p text:style-name="P2">The framework links structural geometry with three dimensional quantum features.</text:p>
        </text:list-item>
        <text:list-item>
          <text:p text:style-name="P2">Symbolic regression extracts readable equations for thermodynamics and magnetism.</text:p>
        </text:list-item>
        <text:list-item>
          <text:p text:style-name="P2">Ground state descriptors fail to predict excited state electronic band gaps.<text:span text:style-name="T1"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8T02:27:07.145024000</meta:creation-date>
    <dc:date>2026-07-08T02:27:35.306633200</dc:date>
    <meta:editing-duration>PT28S</meta:editing-duration>
    <meta:editing-cycles>1</meta:editing-cycles>
    <meta:document-statistic meta:table-count="0" meta:image-count="0" meta:object-count="0" meta:page-count="1" meta:paragraph-count="5" meta:word-count="44" meta:character-count="324" meta:non-whitespace-character-count="289"/>
    <meta:generator>LibreOffice/26.2.0.3$Windows_X86_64 LibreOffice_project/620$Build-3</meta:generator>
  </office:meta>
</office:document-meta>
</file>